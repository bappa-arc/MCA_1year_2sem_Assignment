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ff8" officeooo:paragraph-rsid="001de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</text:p>
      <text:p text:style-name="P1"/>
      <text:p text:style-name="P1">to start running the my sql server <text:s/>mysql -u root -p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5:14:03.054014542</meta:creation-date>
    <dc:date>2026-05-11T15:16:06.507065184</dc:date>
    <meta:editing-duration>PT2M4S</meta:editing-duration>
    <meta:editing-cycles>1</meta:editing-cycles>
    <meta:document-statistic meta:table-count="0" meta:image-count="0" meta:object-count="0" meta:page-count="1" meta:paragraph-count="2" meta:word-count="12" meta:character-count="56" meta:non-whitespace-character-count="45"/>
    <meta:generator>LibreOffice/26.2.2.2$Linux_X86_64 LibreOffice_project/620$Build-2</meta:generator>
  </office:meta>
</office:document-meta>
</file>